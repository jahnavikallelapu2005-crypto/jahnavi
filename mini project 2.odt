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🗊🗊🗊&lt;!DOCTYPE html&gt;</text:p>
      <text:p text:style-name="Standard">&lt;html&gt;</text:p>
      <text:p text:style-name="Standard">&lt;head&gt;</text:p>
      <text:p text:style-name="Standard"><text:s text:c="4"/>&lt;title&gt;Internship Tracker&lt;/title&gt;</text:p>
      <text:p text:style-name="Standard"><text:s text:c="4"/>&lt;style&gt;</text:p>
      <text:p text:style-name="Standard"><text:s text:c="8"/>body {</text:p>
      <text:p text:style-name="Standard"><text:s text:c="12"/>font-family: Arial, sans-serif;</text:p>
      <text:p text:style-name="Standard"><text:s text:c="12"/>max-width: 500px;</text:p>
      <text:p text:style-name="Standard"><text:s text:c="12"/>margin: 20px auto;</text:p>
      <text:p text:style-name="Standard"><text:s text:c="8"/>}</text:p>
      <text:p text:style-name="Standard"><text:s text:c="8"/>input, button {</text:p>
      <text:p text:style-name="Standard"><text:s text:c="12"/>padding: 8px;</text:p>
      <text:p text:style-name="Standard"><text:s text:c="12"/>margin: 5px;</text:p>
      <text:p text:style-name="Standard"><text:s text:c="8"/>}</text:p>
      <text:p text:style-name="Standard"><text:s text:c="8"/>li {</text:p>
      <text:p text:style-name="Standard"><text:s text:c="12"/>margin: 8px 0;</text:p>
      <text:p text:style-name="Standard"><text:s text:c="8"/>}</text:p>
      <text:p text:style-name="Standard"><text:s text:c="4"/>&lt;/style&gt;</text:p>
      <text:p text:style-name="Standard">&lt;/head&gt;</text:p>
      <text:p text:style-name="Standard">&lt;body&gt;</text:p>
      <text:p text:style-name="Standard"/>
      <text:p text:style-name="Standard">&lt;h2&gt;Internship Tracker&lt;/h2&gt;</text:p>
      <text:p text:style-name="Standard"/>
      <text:p text:style-name="Standard">&lt;input type="text" id="company" placeholder="Company Name"&gt;</text:p>
      <text:p text:style-name="Standard">&lt;input type="text" id="role" placeholder="Role"&gt;</text:p>
      <text:p text:style-name="Standard">&lt;button onclick="addInternship()"&gt;Add&lt;/button&gt;</text:p>
      <text:p text:style-name="Standard"/>
      <text:p text:style-name="Standard">&lt;ul id="list"&gt;&lt;/ul&gt;</text:p>
      <text:p text:style-name="Standard"/>
      <text:p text:style-name="Standard">&lt;script&gt;</text:p>
      <text:p text:style-name="Standard"><text:s text:c="4"/>const internships = [];</text:p>
      <text:p text:style-name="Standard"/>
      <text:p text:style-name="Standard"><text:s text:c="4"/>function addInternship() {</text:p>
      <text:p text:style-name="Standard"><text:s text:c="8"/>const company = document.getElementById("company").value;</text:p>
      <text:p text:style-name="Standard"><text:s text:c="8"/>const role = document.getElementById("role").value;</text:p>
      <text:p text:style-name="Standard"/>
      <text:p text:style-name="Standard"><text:s text:c="8"/>if (company === "" || role === "") {</text:p>
      <text:p text:style-name="Standard"><text:s text:c="12"/>alert("Please fill all fields.");</text:p>
      <text:p text:style-name="Standard"><text:s text:c="12"/>return;</text:p>
      <text:p text:style-name="Standard"><text:s text:c="8"/>}</text:p>
      <text:p text:style-name="Standard"/>
      <text:p text:style-name="Standard"><text:s text:c="8"/>internships.push({ company, role });</text:p>
      <text:p text:style-name="Standard"><text:s text:c="8"/>displayInternships();</text:p>
      <text:p text:style-name="Standard"/>
      <text:p text:style-name="Standard"><text:s text:c="8"/>document.getElementById("company").value = "";</text:p>
      <text:p text:style-name="Standard"><text:s text:c="8"/>document.getElementById("role").value = "";</text:p>
      <text:p text:style-name="Standard"><text:s text:c="4"/>}</text:p>
      <text:p text:style-name="Standard"/>
      <text:p text:style-name="Standard"><text:s text:c="4"/>function displayInternships() {</text:p>
      <text:p text:style-name="Standard"><text:s text:c="8"/>const list = document.getElementById("list");</text:p>
      <text:p text:style-name="Standard"><text:s text:c="8"/>list.innerHTML = "";</text:p>
      <text:p text:style-name="Standard"/>
      <text:p text:style-name="Standard"><text:soft-page-break/><text:s text:c="8"/>internships.forEach(item =&gt; {</text:p>
      <text:p text:style-name="Standard"><text:s text:c="12"/>const li = document.createElement("li");</text:p>
      <text:p text:style-name="Standard"><text:s text:c="12"/>li.textContent = `${item.company} - ${item.role}`;</text:p>
      <text:p text:style-name="Standard"><text:s text:c="12"/>list.appendChild(li);</text:p>
      <text:p text:style-name="Standard"><text:s text:c="8"/>});</text:p>
      <text:p text:style-name="Standard"><text:s text:c="4"/>}</text:p>
      <text:p text:style-name="Standard"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5T12:05:31.853803341</meta:creation-date>
    <dc:date>2026-06-25T12:06:39.370100453</dc:date>
    <meta:editing-duration>PT1M8S</meta:editing-duration>
    <meta:editing-cycles>1</meta:editing-cycles>
    <meta:document-statistic meta:table-count="0" meta:image-count="0" meta:object-count="0" meta:page-count="2" meta:paragraph-count="51" meta:word-count="121" meta:character-count="1383" meta:non-whitespace-character-count="1005"/>
    <meta:generator>LibreOffice/7.3.7.2$Linux_X86_64 LibreOffice_project/30$Build-2</meta:generator>
  </office:meta>
</office:document-meta>
</file>